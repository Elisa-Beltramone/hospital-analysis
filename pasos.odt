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>
      <style:paragraph-properties fo:margin-top="0in" fo:margin-bottom="0in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20">
      <style:paragraph-properties fo:margin-top="0in" fo:margin-bottom="0in" style:contextual-spacing="false"/>
    </style:style>
    <style:style style:name="P36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) Anomaly detection (OBLIGATORIO si quieres destacar)</text:h>
      <text:h text:style-name="Heading_20_2" text:outline-level="2">Qué espera el docente:</text:h>
      <text:p text:style-name="Text_20_body">Detectar:</text:p>
      <text:list text:style-name="L1">
        <text:list-item>
          <text:p text:style-name="P1">picos anómalos de demanda </text:p>
        </text:list-item>
        <text:list-item>
          <text:p text:style-name="P1">días de saturación </text:p>
        </text:list-item>
        <text:list-item>
          <text:p text:style-name="P2">eventos raros </text:p>
        </text:list-item>
      </text:list>
      <text:h text:style-name="Heading_20_2" text:outline-level="2">Qué agregar:</text:h>
      <text:list text:style-name="L2">
        <text:list-item>
          <text:p text:style-name="P3">Isolation Forest <text:span text:style-name="Strong_20_Emphasis">o</text:span> </text:p>
        </text:list-item>
        <text:list-item>
          <text:p text:style-name="P3">Z-score rolling <text:span text:style-name="Strong_20_Emphasis">o</text:span> </text:p>
        </text:list-item>
        <text:list-item>
          <text:p text:style-name="P4">STL decomposition + residuals </text:p>
        </text:list-item>
      </text:list>
      <text:h text:style-name="Heading_20_3" text:outline-level="3">Ejemplo conceptual:</text:h>
      <text:list text:style-name="L3">
        <text:list-item>
          <text:p text:style-name="P5">marcar horas con demanda &gt; media + 3σ </text:p>
        </text:list-item>
        <text:list-item>
          <text:p text:style-name="P6">o outliers en residuales del modelo </text:p>
        </text:list-item>
      </text:list>
      <text:p text:style-name="Text_20_body">👉 Esto conecta con “hospital inteligente”</text:p>
      <text:p text:style-name="Horizontal_20_Line"/>
      <text:h text:style-name="Heading_20_1" text:outline-level="1">🌐 B) Variable externa REAL (te falta esto fuerte)</text:h>
      <text:p text:style-name="Text_20_body">Clima ya lo tienes, pero es “pasivo”.</text:p>
      <text:h text:style-name="Heading_20_2" text:outline-level="2">Para subir nivel necesitas 1 fuente externa más:</text:h>
      <text:h text:style-name="Heading_20_3" text:outline-level="3">Opciones buenas:</text:h>
      <text:h text:style-name="Heading_20_4" text:outline-level="4">1. Noticias / eventos locales</text:h>
      <text:list text:style-name="L4">
        <text:list-item>
          <text:p text:style-name="P7">scraping de noticias (RSS o sitios locales) </text:p>
        </text:list-item>
        <text:list-item>
          <text:p text:style-name="P7">keywords: </text:p>
          <text:list>
            <text:list-item>
              <text:p text:style-name="P8">“brotes”, “emergencia”, “accidente”, “ola de calor” </text:p>
            </text:list-item>
          </text:list>
        </text:list-item>
      </text:list>
      <text:h text:style-name="Heading_20_4" text:outline-level="4">2. Datos de movilidad o tráfico</text:h>
      <text:list text:style-name="L5">
        <text:list-item>
          <text:p text:style-name="P9">Google mobility (COVID dataset) </text:p>
        </text:list-item>
        <text:list-item>
          <text:p text:style-name="P10">o proxies de movilidad </text:p>
        </text:list-item>
      </text:list>
      <text:h text:style-name="Heading_20_4" text:outline-level="4"><text:soft-page-break/>3. Calendario social real</text:h>
      <text:list text:style-name="L6">
        <text:list-item>
          <text:p text:style-name="P11">eventos deportivos / conciertos en la ciudad </text:p>
        </text:list-item>
        <text:list-item>
          <text:p text:style-name="P12">impacto en urgencias </text:p>
        </text:list-item>
      </text:list>
      <text:p text:style-name="Text_20_body">👉 esto hace que tu modelo sea “explicativo”, no solo predictivo</text:p>
      <text:p text:style-name="Horizontal_20_Line"/>
      <text:h text:style-name="Heading_20_1" text:outline-level="1">📈 C) Forecasting multi-step (esto es clave para nota alta)</text:h>
      <text:p text:style-name="Text_20_body">Ahora mismo haces:</text:p>
      <text:p text:style-name="Quotations">predicción implícita 1-step</text:p>
      <text:h text:style-name="Heading_20_2" text:outline-level="2">Debes agregar:</text:h>
      <text:list text:style-name="L7">
        <text:list-item>
          <text:p text:style-name="P13">forecast 24h futuro </text:p>
        </text:list-item>
        <text:list-item>
          <text:p text:style-name="P14">forecast 48h–72h futuro </text:p>
        </text:list-item>
      </text:list>
      <text:h text:style-name="Heading_20_3" text:outline-level="3">dos formas:</text:h>
      <text:h text:style-name="Heading_20_4" text:outline-level="4">1. recursive forecasting</text:h>
      <text:p text:style-name="Text_20_body">predices t+1 → lo usas para t+2 → etc</text:p>
      <text:h text:style-name="Heading_20_4" text:outline-level="4">2. direct multi-output model</text:h>
      <text:list text:style-name="L8">
        <text:list-item>
          <text:p text:style-name="P15">modelo que predice vector [t+1 … t+72] </text:p>
        </text:list-item>
      </text:list>
      <text:p text:style-name="Text_20_body">👉 esto es MUY valorado en evaluación</text:p>
      <text:p text:style-name="Horizontal_20_Line"/>
      <text:h text:style-name="Heading_20_1" text:outline-level="1">📊 D) Evaluación seria (te falta formalidad académica)</text:h>
      <text:p text:style-name="Text_20_body">Ahora tienes MAE simple.</text:p>
      <text:h text:style-name="Heading_20_2" text:outline-level="2">Debes agregar:</text:h>
      <text:list text:style-name="L9">
        <text:list-item>
          <text:p text:style-name="P16">MAE por horizonte (1h, 24h, 48h) </text:p>
        </text:list-item>
        <text:list-item>
          <text:p text:style-name="P16">error por hora del día </text:p>
        </text:list-item>
        <text:list-item>
          <text:p text:style-name="P16">error por día de la semana </text:p>
        </text:list-item>
        <text:list-item>
          <text:p text:style-name="P17">comparación vs baseline (ya bien empezado) </text:p>
        </text:list-item>
      </text:list>
      <text:p text:style-name="Text_20_body">👉 esto demuestra “análisis científico”, no solo ML</text:p>
      <text:p text:style-name="Horizontal_20_Line"/>
      <text:h text:style-name="Heading_20_1" text:outline-level="1"><text:soft-page-break/>🧪 E) Backtesting real (mejora clave)</text:h>
      <text:p text:style-name="Text_20_body">Ahora haces split simple.</text:p>
      <text:h text:style-name="Heading_20_2" text:outline-level="2">Debes mejorar a:</text:h>
      <text:list text:style-name="L10">
        <text:list-item>
          <text:p text:style-name="P18">rolling origin evaluation (walk-forward) </text:p>
        </text:list-item>
      </text:list>
      <text:p text:style-name="Text_20_body">Ejemplo:</text:p>
      <text:list text:style-name="L11">
        <text:list-item>
          <text:p text:style-name="P19">entrenas hasta marzo </text:p>
        </text:list-item>
        <text:list-item>
          <text:p text:style-name="P19">predices abril </text:p>
        </text:list-item>
        <text:list-item>
          <text:p text:style-name="P20">avanzas mes a mes </text:p>
        </text:list-item>
      </text:list>
      <text:p text:style-name="Text_20_body">👉 esto es nivel “production forecasting”</text:p>
      <text:p text:style-name="Horizontal_20_Line"/>
      <text:h text:style-name="Heading_20_1" text:outline-level="1">📦 F) Segmentación (esto te sube mucho la nota)</text:h>
      <text:p text:style-name="Text_20_body">Ya tienes DIAGNOSTICO.</text:p>
      <text:h text:style-name="Heading_20_2" text:outline-level="2">Mejora:</text:h>
      <text:list text:style-name="L12">
        <text:list-item>
          <text:p text:style-name="P21">modelar demanda por: </text:p>
          <text:list>
            <text:list-item>
              <text:p text:style-name="P21">especialidad </text:p>
            </text:list-item>
            <text:list-item>
              <text:p text:style-name="P21">género </text:p>
            </text:list-item>
            <text:list-item>
              <text:p text:style-name="P22">obra social </text:p>
            </text:list-item>
          </text:list>
        </text:list-item>
      </text:list>
      <text:p text:style-name="Text_20_body">Ejemplo:</text:p>
      <text:list text:style-name="L13">
        <text:list-item>
          <text:p text:style-name="P23">modelo global </text:p>
        </text:list-item>
        <text:list-item>
          <text:p text:style-name="P24">vs modelos por cluster </text:p>
        </text:list-item>
      </text:list>
      <text:p text:style-name="Text_20_body">👉 esto demuestra pensamiento hospitalario real</text:p>
      <text:p text:style-name="Horizontal_20_Line"/>
      <text:h text:style-name="Heading_20_1" text:outline-level="1">🚨 G) Feature engineering avanzado (opcional pero suma mucho)</text:h>
      <text:p text:style-name="Text_20_body">Podrías agregar:</text:p>
      <text:list text:style-name="L14">
        <text:list-item>
          <text:p text:style-name="P25">interacción clima × hora (ej: calor en la tarde) </text:p>
        </text:list-item>
        <text:list-item>
          <text:p text:style-name="P25">anomalía como feature </text:p>
        </text:list-item>
        <text:list-item>
          <text:p text:style-name="P25">tendencia semanal (rolling mean 7d) </text:p>
        </text:list-item>
        <text:list-item>
          <text:p text:style-name="P26">encoding de “estrés hospitalario” (lag de saturación) </text:p>
        </text:list-item>
      </text:list>
      <text:p text:style-name="Horizontal_20_Line"/>
      <text:h text:style-name="Heading_20_1" text:outline-level="1"><text:soft-page-break/>🧠 3. Cómo lo vería un docente exigente</text:h>
      <text:h text:style-name="Heading_20_3" text:outline-level="3">Estado actual:</text:h>
      <text:p text:style-name="Quotations">buen proyecto técnico de forecasting aplicado</text:p>
      <text:h text:style-name="Heading_20_3" text:outline-level="3">Con mejoras:</text:h>
      <text:p text:style-name="Quotations">proyecto de ciencia de datos aplicado con componente predictivo + explicativo + operacional</text:p>
      <text:p text:style-name="Horizontal_20_Line"/>
      <text:h text:style-name="Heading_20_1" text:outline-level="1">🟢 4. Prioridad de mejoras (IMPORTANTE)</text:h>
      <text:p text:style-name="Text_20_body">Si tienes poco tiempo:</text:p>
      <text:h text:style-name="Heading_20_2" text:outline-level="2">🔥 PRIORIDAD 1 (obligatorio)</text:h>
      <text:list text:style-name="L15">
        <text:list-item>
          <text:p text:style-name="P27">anomaly detection </text:p>
        </text:list-item>
        <text:list-item>
          <text:p text:style-name="P28">rolling evaluation más serio </text:p>
        </text:list-item>
      </text:list>
      <text:h text:style-name="Heading_20_2" text:outline-level="2">🔥 PRIORIDAD 2 (muy importante)</text:h>
      <text:list text:style-name="L16">
        <text:list-item>
          <text:p text:style-name="P29">forecasting 24–72h explícito </text:p>
        </text:list-item>
        <text:list-item>
          <text:p text:style-name="P30">error por segmentos (hora/día) </text:p>
        </text:list-item>
      </text:list>
      <text:h text:style-name="Heading_20_2" text:outline-level="2">🔥 PRIORIDAD 3 (diferencial)</text:h>
      <text:list text:style-name="L17">
        <text:list-item>
          <text:p text:style-name="P31">1 variable externa nueva (noticias o eventos) </text:p>
        </text:list-item>
      </text:list>
      <text:h text:style-name="Heading_20_2" text:outline-level="2">🔥 PRIORIDAD 4 (bonus)</text:h>
      <text:list text:style-name="L18">
        <text:list-item>
          <text:p text:style-name="P32">segmentación por especialidad / diagnóstico </text:p>
        </text:list-item>
      </text:list>
      <text:p text:style-name="Horizontal_20_Line"/>
      <text:h text:style-name="Heading_20_1" text:outline-level="1">Predicción de diagnósticos futuros (mix clínico)</text:h>
      <text:p text:style-name="Text_20_body">Ya lo estás tocando.</text:p>
      <text:p text:style-name="Text_20_body">Puedes predecir:</text:p>
      <text:list text:style-name="L19">
        <text:list-item>
          <text:p text:style-name="P33">distribución de diagnósticos mañana </text:p>
        </text:list-item>
        <text:list-item>
          <text:p text:style-name="P33">brotes (ej: infecciones respiratorias) </text:p>
        </text:list-item>
        <text:list-item>
          <text:p text:style-name="P34">clusters de patologías </text:p>
        </text:list-item>
      </text:list>
      <text:p text:style-name="Text_20_body"><text:soft-page-break/>👉 Esto permite:</text:p>
      <text:list text:style-name="L20">
        <text:list-item>
          <text:p text:style-name="P35">planificar especialistas </text:p>
        </text:list-item>
        <text:list-item>
          <text:p text:style-name="P35">stock de medicamentos </text:p>
        </text:list-item>
        <text:list-item>
          <text:p text:style-name="P36">recursos crítico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8:03:41.344103598</meta:creation-date>
    <dc:date>2026-06-09T14:29:00.729611398</dc:date>
    <meta:editing-duration>PT6H25M20S</meta:editing-duration>
    <meta:editing-cycles>2</meta:editing-cycles>
    <meta:generator>LibreOffice/26.2.3.2$Linux_X86_64 LibreOffice_project/d4d5ed47b6084125f28d269a5650105d54dde034</meta:generator>
    <meta:document-statistic meta:table-count="0" meta:image-count="0" meta:object-count="0" meta:page-count="5" meta:paragraph-count="102" meta:word-count="507" meta:character-count="3032" meta:non-whitespace-character-count="2630"/>
  </office:meta>
</office:document-meta>
</file>